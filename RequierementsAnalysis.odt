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F000002BD098273269F7A03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language="en" fo:country="GB"/>
    </style:style>
    <style:style style:name="P3" style:family="paragraph" style:parent-style-name="Text_20_body">
      <style:text-properties officeooo:rsid="000126c2" officeooo:paragraph-rsid="000126c2"/>
    </style:style>
    <style:style style:name="P4" style:family="paragraph" style:parent-style-name="Text_20_body">
      <style:text-properties officeooo:paragraph-rsid="000126c2"/>
    </style:style>
    <style:style style:name="P5" style:family="paragraph" style:parent-style-name="Text_20_body">
      <style:text-properties officeooo:rsid="00016110" officeooo:paragraph-rsid="00016110"/>
    </style:style>
    <style:style style:name="P6" style:family="paragraph" style:parent-style-name="Heading_20_1" style:master-page-name="MP0">
      <style:paragraph-properties style:page-number="auto" fo:break-before="page"/>
    </style:style>
    <style:style style:name="P7" style:family="paragraph" style:parent-style-name="Heading_20_3">
      <style:text-properties officeooo:paragraph-rsid="00016110"/>
    </style:style>
    <style:style style:name="P8" style:family="paragraph" style:parent-style-name="Heading_20_3">
      <style:text-properties fo:language="en" fo:country="GB"/>
    </style:style>
    <style:style style:name="P9" style:family="paragraph" style:parent-style-name="Heading_20_3">
      <style:text-properties officeooo:paragraph-rsid="00012026"/>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text-properties officeooo:rsid="00016110" officeooo:paragraph-rsid="00016110"/>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text-properties officeooo:rsid="00012026" officeooo:paragraph-rsid="00012026"/>
    </style:style>
    <style:style style:name="P20" style:family="paragraph" style:parent-style-name="Text_20_body">
      <style:text-properties officeooo:rsid="000238af" officeooo:paragraph-rsid="000238af"/>
    </style:style>
    <style:style style:name="T1" style:family="text">
      <style:text-properties officeooo:rsid="00012026"/>
    </style:style>
    <style:style style:name="T2" style:family="text">
      <style:text-properties officeooo:rsid="000126c2"/>
    </style:style>
    <style:style style:name="T3" style:family="text">
      <style:text-properties officeooo:rsid="00016110"/>
    </style:style>
    <style:style style:name="T4" style:family="text">
      <style:text-properties officeooo:rsid="000238af"/>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1. Introduction</text:h>
      <text:p text:style-name="Text_20_body">Small game</text:p>
      <text:p text:style-name="P1"><text:a xlink:type="simple" xlink:href="https://stormboard.com/storm/1886510/The_Magic_Apprentice_game" office:target-frame-name="_top" xlink:show="replace" text:style-name="Internet_20_link" text:visited-style-name="Visited_20_Internet_20_Link">https://stormboard.com/storm/1886510/The_Magic_Apprentice_game</text:a></text:p>
      <text:p text:style-name="P1"><draw:frame draw:style-name="fr1" draw:name="Bild1" text:anchor-type="paragraph" svg:x="0.432cm" svg:y="-0.148cm" svg:width="15.637cm" style:rel-width="scale" svg:height="18.547cm" style:rel-height="scale" draw:z-index="0"><draw:image xlink:href="Pictures/100000010000024F000002BD098273269F7A0395.png" xlink:type="simple" xlink:show="embed" xlink:actuate="onLoad" draw:mime-type="image/png"/></draw:frame></text:p>
      <text:p text:style-name="Text_20_body"/>
      <text:p text:style-name="Text_20_body"/>
      <text:p text:style-name="Text_20_body"/>
      <text:p text:style-name="Text_20_body"/>
      <text:p text:style-name="Text_20_body"><text:soft-page-break/></text:p>
      <text:h text:style-name="Heading_20_2" text:outline-level="2"/>
      <text:h text:style-name="Heading_20_2" text:outline-level="2"/>
      <text:h text:style-name="Heading_20_2" text:outline-level="2"/>
      <text:h text:style-name="Heading_20_2" text:outline-level="2">1.1. Purpose of the system</text:h>
      <text:p text:style-name="Text_20_body">Having fun</text:p>
      <text:h text:style-name="Heading_20_2" text:outline-level="2">1.2. Scope of the system</text:h>
      <text:p text:style-name="Text_20_body">Video game using Godot 4</text:p>
      <text:h text:style-name="Heading_20_2" text:outline-level="2">1.3. Objectives and success criteria of the project</text:h>
      <text:p text:style-name="P5">The goal of this project is the creation of a single player RPG web game.</text:p>
      <text:h text:style-name="Heading_20_2" text:outline-level="2">1.4. Definitions, acronyms, and abbreviations</text:h>
      <text:p text:style-name="Text_20_body">none</text:p>
      <text:h text:style-name="Heading_20_2" text:outline-level="2">1.5. References</text:h>
      <text:h text:style-name="Heading_20_2" text:outline-level="2">1.6. Overview</text:h>
      <text:h text:style-name="Heading_20_1" text:outline-level="1">2. Proposed system</text:h>
      <text:h text:style-name="Heading_20_2" text:outline-level="2">2.1. Overview</text:h>
      <text:p text:style-name="Text_20_body">Player is a magician that explores dungeons. In these they fight slimes with 3 magic spells and maybe solve puzzles to get to the boss room, where they fight a boss.</text:p>
      <text:p text:style-name="Text_20_body">There are 2 types of dungeons. Automatically generated ones and story dungeons, that are hand crafted. Furthermore, the player can choose to curse a dungeon which increases the difficulty by strengthening the enemies or weakening the player. Cursed dungeons give better rewards.</text:p>
      <text:p text:style-name="Text_20_body">By defeating the boss they can unlock new magic of the 3 different magic types.</text:p>
      <text:p text:style-name="Text_20_body">Players also get “augments” these are used instead of armor. They have between 1 and 3 effects. These effects can be simple stat increases or additional effects (like casting one Skill when another is cast or increasing damaging area).<text:line-break/>The player can wear a total of 5 augments at a time. Additional augments can be stored in an inventory. Slots are unlocked by playing story dungeons.</text:p>
      <text:p text:style-name="Text_20_body">Players can only change their load-out (active augments and spells) outside of dungeons in the home town. This is done since the difficulty of generated dungeons is determined by the amount of augments the player is currently using.</text:p>
      <text:p text:style-name="Text_20_body">The game is supposed to be finishable in under 2 hours. The idea is hence not to create a long game, but instead allow great replayability by having many different and interesting choices of playstyles <text:soft-page-break/>and builds.</text:p>
      <text:h text:style-name="Heading_20_2" text:outline-level="2">2.2. Functional requirements</text:h>
      <text:p text:style-name="Text_20_body">Global Enum for damage types:</text:p>
      <text:p text:style-name="Text_20_body">Sun, Cosmic, Dark. (Sun &gt; Cosmic &gt; Dark &gt; Sun, like rock Paper scissors)</text:p>
      <text:p text:style-name="Text_20_body">Camera follows the player</text:p>
      <text:h text:style-name="Heading_20_3" text:outline-level="3">2.2.1 Components</text:h>
      <text:h text:style-name="Heading_20_4" text:outline-level="4">Health component</text:h>
      <text:list xml:id="list3144367461" text:style-name="L1">
        <text:list-item>
          <text:p text:style-name="P10">Dictionary for armor values</text:p>
          <text:list>
            <text:list-item>
              <text:p text:style-name="P10">armor is percent absorption. i.e. 40 armor means 40% of damage is absorbed</text:p>
            </text:list-item>
          </text:list>
        </text:list-item>
        <text:list-item>
          <text:p text:style-name="P10">current health (float)</text:p>
        </text:list-item>
        <text:list-item>
          <text:p text:style-name="P10">take damage function</text:p>
          <text:list>
            <text:list-item>
              <text:p text:style-name="P10">takes damage type and value as input</text:p>
            </text:list-item>
            <text:list-item>
              <text:p text:style-name="P10">health = health - damage*(100-armor)/100</text:p>
            </text:list-item>
            <text:list-item>
              <text:p text:style-name="P10">if health is 0 or less, emit signal, that object dies</text:p>
            </text:list-item>
          </text:list>
        </text:list-item>
      </text:list>
      <text:h text:style-name="Heading_20_4" text:outline-level="4">State machine</text:h>
      <text:p text:style-name="Text_20_body">A state is a subnode of the state machine. The state knows which state/node is currently active and redirects the process function to it.</text:p>
      <text:p text:style-name="Text_20_body">Use a “changestate” function to change the state.</text:p>
      <text:p text:style-name="Text_20_body">This state machine also handles animations.</text:p>
      <text:p text:style-name="Text_20_body">Possible states:</text:p>
      <text:list xml:id="list1288828738" text:style-name="L2">
        <text:list-item>
          <text:p text:style-name="P11">idle</text:p>
        </text:list-item>
        <text:list-item>
          <text:p text:style-name="P11">moving</text:p>
        </text:list-item>
        <text:list-item>
          <text:p text:style-name="P11">dash</text:p>
        </text:list-item>
        <text:list-item>
          <text:p text:style-name="P11">attacking</text:p>
        </text:list-item>
      </text:list>
      <text:h text:style-name="Heading_20_3" text:outline-level="3">2.2.2 How damage is applied</text:h>
      <text:p text:style-name="Text_20_body">A Damaging ability creates an area2D with the damage type and the damage value.<text:line-break/>If the Area2D intersects something, it will check if it has a damage component and then call the “take damage” function.</text:p>
      <text:p text:style-name="Text_20_body">In order to prevent the entities to damage themselves, layers or groups can be used.</text:p>
      <text:h text:style-name="Heading_20_3" text:outline-level="3">2.2.3 Player movement</text:h>
      <text:p text:style-name="Text_20_body">Character moves with wasd.</text:p>
      <text:p text:style-name="Text_20_body">Character can dash by pressing spacebar. While dashing, the player has no hit box and thus cannot take damage.</text:p>
      <text:p text:style-name="Text_20_body"><text:soft-page-break/>Player casts skills with 123. During casting, player cannot move, but cast times are small.<text:line-break/>All skills have the same player animation (player holds up staff), but if the cast time is slower, the animation plays slower. The spell comes out of the tip of the staff. Use color coding and different visuals to differentiate between the different spells</text:p>
      <text:h text:style-name="P7" text:outline-level="3">2.2.<text:span text:style-name="T3">4</text:span> Player <text:span text:style-name="T3">Skills</text:span></text:h>
      <text:p text:style-name="P5">The player can choose up to three skills:</text:p>
      <text:list xml:id="list3042557675" text:style-name="L3">
        <text:list-item>
          <text:p text:style-name="P13">For all base skills, a color coded circular projectile is shot from the tip of the staff in the direction of the mouse.</text:p>
        </text:list-item>
        <text:list-item>
          <text:p text:style-name="P13">SUN</text:p>
          <text:list>
            <text:list-item>
              <text:p text:style-name="P13">Sunbeam: <text:span text:style-name="T3">Todo consider making this a beam that does damage and make moonlight attack and defense buff.</text:span></text:p>
            </text:list-item>
            <text:list-item>
              <text:p text:style-name="P13">summon sun: <text:span text:style-name="T2">spawn a sun at mouse location for a few seconds, enemies close to it take damage depending on how close they are to the sun.</text:span></text:p>
            </text:list-item>
          </text:list>
        </text:list-item>
        <text:list-item>
          <text:p text:style-name="P13">Cosmic:</text:p>
          <text:list>
            <text:list-item>
              <text:p text:style-name="P13">Moon light: <text:span text:style-name="T3">ray of moonlight shines down on the player increasing their defenses.</text:span></text:p>
            </text:list-item>
            <text:list-item>
              <text:p text:style-name="P13">Star rain: <text:span text:style-name="T3">multiple single projectiles spawn around the player with random offset and start homing to mouse position. On collision with enemy they do damage and despawn.</text:span></text:p>
            </text:list-item>
          </text:list>
        </text:list-item>
        <text:list-item>
          <text:p text:style-name="P13">Dark:</text:p>
          <text:list>
            <text:list-item>
              <text:p text:style-name="P13">dark energy wave: <text:span text:style-name="T3">pushes all enemies away from the player.</text:span></text:p>
            </text:list-item>
            <text:list-item>
              <text:p text:style-name="P13">black hole: <text:span text:style-name="T3">creates a round black void at mouse position that pulls all enemies towards it, if they hit the black void they take massive damage.</text:span></text:p>
            </text:list-item>
          </text:list>
        </text:list-item>
      </text:list>
      <text:h text:style-name="Heading_20_3" text:outline-level="3">2.2.<text:span text:style-name="T3">5</text:span> Enemies</text:h>
      <text:p text:style-name="Text_20_body">Each Enemy only deals damage of one type. It will have high armor against this damage type and low armor against the type that it should be weak against.</text:p>
      <text:p text:style-name="Text_20_body">Use color coding to signal the type to the player</text:p>
      <text:p text:style-name="Text_20_body">Types of enemies:</text:p>
      <text:list xml:id="list1779465244" text:style-name="L4">
        <text:list-item>
          <text:p text:style-name="P14">Slimes (small and big)</text:p>
        </text:list-item>
        <text:list-item>
          <text:p text:style-name="P14">mini bosses like unicorns</text:p>
        </text:list-item>
        <text:list-item>
          <text:p text:style-name="P14">Big bosses (probably no time for this) with special designs and attacks</text:p>
        </text:list-item>
      </text:list>
      <text:p text:style-name="Text_20_body">Enemies are controlled via their state machine.<text:line-break/>Most will deal only melee damage. Hence they will track the player and once they are close attack him.</text:p>
      <text:p text:style-name="Text_20_body">Slimes will come in large groups. Use Group behaviors to simulate better movement (not all of them stand on top of each other, but instead keep distance).</text:p>
      <text:h text:style-name="Heading_20_3" text:outline-level="3"><text:soft-page-break/>2.2.<text:span text:style-name="T3">5</text:span>.1 Slimes</text:h>
      <text:p text:style-name="Text_20_body">There are two different types of slimes, mele and ranged.</text:p>
      <text:p text:style-name="P2">Mele slimes move towards the player and once they are close to the player, they start attacking with their element by blobbing onto them. <text:line-break/>Ranged slimes shoot small projectiles in the direction of the player. If the player is out of their range, they move closer to them. Different attack patterns can be implemented if there is time. </text:p>
      <text:p text:style-name="P2">Mele and ranged slimes differ in color brightness. Slimes are color coded to the element they belong to.</text:p>
      <text:h text:style-name="Heading_20_3" text:outline-level="3">2.2.<text:span text:style-name="T3">5</text:span>.2 Unicorns</text:h>
      <text:p text:style-name="Text_20_body">Unicorns have different attack patterns:</text:p>
      <text:list xml:id="list4182087610" text:style-name="L5">
        <text:list-item>
          <text:p text:style-name="P15">Charges at player, big damage if player is hit </text:p>
        </text:list-item>
        <text:list-item>
          <text:p text:style-name="P15">Shoots projectiles at player </text:p>
        </text:list-item>
        <text:list-item>
          <text:p text:style-name="P15">Mele attack by stomping on the player </text:p>
        </text:list-item>
      </text:list>
      <text:p text:style-name="Text_20_body">If player is within a certain radius, only mele attack are used, otherwise one of the two ranged attacks is used at random.</text:p>
      <text:h text:style-name="P8" text:outline-level="3">2.2.<text:span text:style-name="T3">6</text:span> Skill Tree</text:h>
      <text:p text:style-name="Text_20_body">Each Element has its own small skill tree.<text:line-break/>Skill points for each tree are earned by clearing dungeons of that type.</text:p>
      <text:p text:style-name="Text_20_body">The player chooses an element at the beginning of a playthrough and unlocks with it the basic spell of that element for the intro dungeon. After completing the intro dungeon, the player automatically unlocks the basic spell of the element that his chosen element is weak against (e.g., player chooses sun and receives the basic dark spell after the intro dungeon).</text:p>
      <text:p text:style-name="Text_20_body">Each Element has 3 spells. (Damage values shall be determined during development to allow good balance)</text:p>
      <text:list xml:id="list320768877" text:style-name="L6">
        <text:list-item>
          <text:p text:style-name="P16">One basic spell that just shoots a colored projectile (this is the first skill of every tree).</text:p>
        </text:list-item>
      </text:list>
      <text:list xml:id="list2164039897" text:style-name="L7">
        <text:list-item>
          <text:p text:style-name="P17">One supportive spell</text:p>
          <text:list>
            <text:list-item>
              <text:p text:style-name="P17">Sun: sunbeam (attack buff)</text:p>
            </text:list-item>
            <text:list-item>
              <text:p text:style-name="P17">Cosmic: Moon light (def buff)</text:p>
            </text:list-item>
            <text:list-item>
              <text:p text:style-name="P17">Dark: dark energy wave (pushes enemies away from player)</text:p>
            </text:list-item>
          </text:list>
        </text:list-item>
        <text:list-item>
          <text:p text:style-name="P17">One offensive spell</text:p>
          <text:list>
            <text:list-item>
              <text:p text:style-name="P17">Sun: summon sun (aoe damage on location)</text:p>
            </text:list-item>
            <text:list-item>
              <text:p text:style-name="P17">Cosmic: Star rain (multiple stars erupt from staff and move towards target location. damaging the first enemy they collide with)</text:p>
            </text:list-item>
            <text:list-item>
              <text:p text:style-name="P17">Dark: black hole (aoe pulls enemies in)</text:p>
            </text:list-item>
          </text:list>
        </text:list-item>
      </text:list>
      <text:p text:style-name="Text_20_body">All skills have hidden upgrades that improve the skill and are only shown in the skill tree after the player unlocks them by fulfilling a certain condition, e.g., clearing a dungeon with only one spell <text:soft-page-break/>unlocks an improved version of that spell.</text:p>
      <text:p text:style-name="Text_20_body">Further passive Skills (like damage increase or range increase) can be added as well, if there is time.</text:p>
      <text:h text:style-name="Heading_20_3" text:outline-level="3">2.2.<text:span text:style-name="T3">7</text:span> Augments</text:h>
      <text:p text:style-name="Text_20_body">Instead of a traditional armor and weapon system, we only use augments. <text:line-break/>This means that there is no specific slot where an augment has to go. This will allow easy build crafting for the player.</text:p>
      <text:p text:style-name="Text_20_body">The player has a total of 5 augment slots. </text:p>
      <text:p text:style-name="Text_20_body">The first augment slot is unlocked after the intro dungeon.<text:line-break/>Additional slots are unlocked by playing the story dungeons.</text:p>
      <text:p text:style-name="Text_20_body">Augments can drop from regular enemies (low change) and are guaranteed to drop from bosses.</text:p>
      <text:p text:style-name="Text_20_body">Each augment will have 1, 2 or 3 effects (in case they are the same effect, they will stack). The amount of effects determines the quality of the augment. The effects are decided randomly by the game when the augment is dropped.</text:p>
      <text:p text:style-name="Text_20_body">To allow build crafting for the player, it is possible to destroy one augment and the one of its effects onto another augment, overwriting one of its effects.</text:p>
      <text:p text:style-name="Text_20_body">The most effects will have percentage values. This means that effects of the same type will stack multiplicative.</text:p>
      <text:h text:style-name="Heading_20_4" text:outline-level="4">2.2.<text:span text:style-name="T3">7</text:span>.1 List of Effects</text:h>
      <text:p text:style-name="Text_20_body">The effects of the augment are the following: (values are not fixed and can be changed to allow good balancing)</text:p>
      <text:list xml:id="list4193016781" text:style-name="L8">
        <text:list-item>
          <text:p text:style-name="P18">10 additional armor of a type</text:p>
        </text:list-item>
        <text:list-item>
          <text:p text:style-name="P18">5 additional armor of all types</text:p>
        </text:list-item>
        <text:list-item>
          <text:p text:style-name="P18">10% more hp</text:p>
        </text:list-item>
        <text:list-item>
          <text:p text:style-name="P18">10% extra damage for one skill (one for each damaging ability)</text:p>
        </text:list-item>
        <text:list-item>
          <text:p text:style-name="P18">5% extra damage for one element</text:p>
        </text:list-item>
        <text:list-item>
          <text:p text:style-name="P18">1% life steal</text:p>
        </text:list-item>
        <text:list-item>
          <text:p text:style-name="P18">10% bigger radius for one skill (exists for “summon sun”, “black hole”)</text:p>
        </text:list-item>
        <text:list-item>
          <text:p text:style-name="P18">10% more stars for “star rain”</text:p>
        </text:list-item>
        <text:list-item>
          <text:p text:style-name="P18">Upon casting spell x also cast spell y (specific spells will be determined during balancing)</text:p>
        </text:list-item>
        <text:list-item>
          <text:p text:style-name="P18">Spell x explodes on impact with enemy (for directional skills only)</text:p>
        </text:list-item>
      </text:list>
      <text:h text:style-name="P8" text:outline-level="3">2.2.<text:span text:style-name="T3">8</text:span> Dungeons</text:h>
      <text:p text:style-name="P2">We want 5 handcrafted story dungeons plus a handcrafted intro dungeon. Additional dungeons will be procedurally generated. </text:p>
      <text:p text:style-name="P2">Dungeons are composed of a set of rooms which are connected through doors. Each room is an instance. In the last room of each dungeon is a boss. </text:p>
      <text:p text:style-name="P2"><text:soft-page-break/>The first time the player enters a room, a bunch of slimes are spawned. The player can only exit the room after killing all enemies within it. </text:p>
      <text:p text:style-name="P2">The layout of the rooms does not need to be rectangular.</text:p>
      <text:p text:style-name="P2">Dungeons can be left early. When dying or leaving a dungeon voluntarily all previous collected items remain in the player’s inventory. The dungeon then has to be started again from the beginning. </text:p>
      <text:h text:style-name="Heading_20_4" text:outline-level="4">2.2.<text:span text:style-name="T3">8</text:span>.1 Intro Dungeon</text:h>
      <text:p text:style-name="Text_20_body">A shorter dungeon that serves as a tutorial for the game. Before entering the dungeon, the player chooses the element with which they want to start. The slimes inside the dungeon will change their element according to the players choice to teach the player about the strengths and weaknesses of their element. </text:p>
      <text:p text:style-name="Text_20_body">At the end of the dungeon the player the boss is a very big slime. </text:p>
      <text:h text:style-name="Heading_20_4" text:outline-level="4">2.2.<text:span text:style-name="T3">8</text:span>.2 Story Dungeons</text:h>
      <text:p text:style-name="Text_20_body">There are 5 story dungeons. </text:p>
      <text:p text:style-name="Text_20_body">The bosses of the story dungeons 1 to 4 are unicorns. The last dungeon has a specially designed boss. </text:p>
      <text:h text:style-name="Heading_20_4" text:outline-level="4">2.2.<text:span text:style-name="T3">8</text:span>.3 Generated Dungeons</text:h>
      <text:p text:style-name="Text_20_body">At the start of the generated dungeon, the player can choose which element the dungeon should have. This choice determines the element of the final boss and guarantees that at least 50% of all slimes in the dungeon are of this element. </text:p>
      <text:p text:style-name="Text_20_body">Dungeons can be cursed before starting the dungeon. The dungeon will then be harder by strengthening enemies or weakening the player. </text:p>
      <text:p text:style-name="Text_20_body">Upon dying the player has the choice to either retry the previously generated dungeon or to create a new one. </text:p>
      <text:p text:style-name="Text_20_body">If the player decides to leave the dungeon, they cannot try the same dungeon again. Instead, a new one will be generated. </text:p>
      <text:p text:style-name="Text_20_body">The number of rooms in the dungeon is decided randomly from a distribution. </text:p>
      <text:p text:style-name="Text_20_body"/>
      <text:h text:style-name="Heading_20_2" text:outline-level="2">2.3. Nonfunctional requirements</text:h>
      <text:p text:style-name="Text_20_body">Use component based architecture if possible.<text:line-break/>Desired FPS: 60</text:p>
      <text:p text:style-name="Text_20_body">Please include the coding style here, as well as the performance as the frame rate that is to be achieved % the requirements are written in such a way that they can also be checked - later this should also be checked explicitly in the results</text:p>
      <text:h text:style-name="P9" text:outline-level="3">2.3.1. User interface and human factors</text:h>
      <text:p text:style-name="P19">Outside the dungeon the user can use the ui to choose their spells and augments and spent skill points. Furthermore, they can select a dungeon they want to enter.</text:p>
      <text:p text:style-name="P20"><text:soft-page-break/>User interface is controlled via mouse and keyboard.</text:p>
      <text:p text:style-name="Text_20_body"/>
      <text:h text:style-name="Heading_20_3" text:outline-level="3">2.3.2. Documentation</text:h>
      <text:p text:style-name="Text_20_body"><text:span text:style-name="T1">Every nontrivial function must have a comment above that explains the usage of this function.</text:span></text:p>
      <text:p text:style-name="P20">Plus external documentation.</text:p>
      <text:h text:style-name="Heading_20_3" text:outline-level="3">2.3.3. Hardware considerations</text:h>
      <text:p text:style-name="Text_20_body">For PCs that can run Godot 4 game engine.</text:p>
      <text:h text:style-name="Heading_20_3" text:outline-level="3">2.3.4. Performance characteristics</text:h>
      <text:p text:style-name="P3">I don’t know get 60 FPS</text:p>
      <text:h text:style-name="Heading_20_3" text:outline-level="3">2.3.5. Error handling and extreme conditions</text:h>
      <text:p text:style-name="P4"><text:span text:style-name="T2">In order to avoid problems, every method that can run into an error or return an error value has to be explicitly marked and then whenever such a function it’s called the error has to be handled immediately.</text:span></text:p>
      <text:h text:style-name="Heading_20_3" text:outline-level="3">2.3.6. Quality issues</text:h>
      <text:p text:style-name="Text_20_body"><text:s/><text:span text:style-name="T2">Todo</text:span></text:p>
      <text:h text:style-name="Heading_20_3" text:outline-level="3">2.3.7. System modifications</text:h>
      <text:p text:style-name="Text_20_body"><text:s/><text:span text:style-name="T2">todo</text:span></text:p>
      <text:h text:style-name="Heading_20_3" text:outline-level="3">2.3.8. Physical environment</text:h>
      <text:p text:style-name="Text_20_body"><text:span text:style-name="T2">Run on a computer </text:span><text:span text:style-name="T3">inside a browser</text:span></text:p>
      <text:h text:style-name="Heading_20_3" text:outline-level="3">2.3.9. Security issues</text:h>
      <text:p text:style-name="Text_20_body"><text:span text:style-name="T2">Since the game will be a single player game hacking and accessing game data is irrelevant. If the player wants to cheat or change something in the game they are free to do so as it does not affect anyone else.</text:span></text:p>
      <text:p text:style-name="P3">Furthermore the game should also only be allowed to read and write in the designated folder <text:span text:style-name="T4">for</text:span> the game and does not pose a security risk to the player’s computer.</text:p>
      <text:h text:style-name="Heading_20_3" text:outline-level="3">2.3.10. Resource issues</text:h>
      <text:p text:style-name="Text_20_body"><text:s/><text:span text:style-name="T2">Todo</text:span></text:p>
      <text:h text:style-name="Heading_20_2" text:outline-level="2"><text:soft-page-break/>2.4. Pseudo requirements</text:h>
      <text:h text:style-name="Heading_20_2" text:outline-level="2">2.5. System models</text:h>
      <text:h text:style-name="Heading_20_3" text:outline-level="3">2.5.1. Scenarios</text:h>
      <text:h text:style-name="Heading_20_3" text:outline-level="3">2.5.2. Use case model</text:h>
      <text:h text:style-name="Heading_20_3" text:outline-level="3">2.5.3. Object model</text:h>
      <text:h text:style-name="Heading_20_3" text:outline-level="3">2.5.3.1. Data dictionary</text:h>
      <text:h text:style-name="Heading_20_3" text:outline-level="3">2.5.3.2. Class diagrams</text:h>
      <text:h text:style-name="Heading_20_3" text:outline-level="3">2.5.4. Dynamic models</text:h>
      <text:h text:style-name="Heading_20_3" text:outline-level="3">2.5.5. User-interface -- navigational paths and screen mock-ups</text:h>
      <text:h text:style-name="Heading_20_1" text:outline-level="1">3. Glossary</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creation-date>2023-11-23T16:09:00Z</meta:creation-date>
    <dc:date>2024-03-10T15:46:20.816000000</dc:date>
    <meta:editing-cycles>31</meta:editing-cycles>
    <meta:editing-duration>PT15M32S</meta:editing-duration>
    <meta:document-statistic meta:table-count="0" meta:image-count="1" meta:object-count="0" meta:page-count="9" meta:paragraph-count="170" meta:word-count="2167" meta:character-count="12458" meta:non-whitespace-character-count="10484"/>
    <meta:template xlink:type="simple" xlink:actuate="onRequest" xlink:title="" xlink:href="Normal.dotm"/>
  </office:meta>
</office:document-meta>
</file>